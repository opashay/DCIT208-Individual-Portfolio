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hyphenate="tru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paragraph-properties fo:text-align="justify"/>
      <style:text-properties fo:font-weight="bold" style:font-weight-asian="bold" style:font-weight-complex="bold"/>
    </style:style>
    <style:style style:name="P28" style:parent-style-name="Normal" style:family="paragraph">
      <style:paragraph-properties fo:text-align="justify"/>
    </style:style>
    <style:style style:name="P29" style:parent-style-name="Normal" style:family="paragraph">
      <style:paragraph-properties fo:text-align="justify"/>
      <style:text-properties fo:font-weight="bold" style:font-weight-asian="bold" style:font-weight-complex="bold"/>
    </style:style>
    <style:style style:name="P30" style:parent-style-name="Normal" style:family="paragraph">
      <style:paragraph-properties fo:text-align="justify"/>
    </style:style>
    <style:style style:name="P31" style:parent-style-name="Normal" style:family="paragraph">
      <style:paragraph-properties fo:text-align="justify"/>
      <style:text-properties fo:font-weight="bold" style:font-weight-asian="bold" style:font-weight-complex="bold"/>
    </style:style>
    <style:style style:name="P32" style:parent-style-name="Normal" style:family="paragraph">
      <style:paragraph-properties fo:text-align="justify"/>
    </style:style>
    <style:style style:name="P33" style:parent-style-name="Normal" style:family="paragraph">
      <style:paragraph-properties fo:text-align="justify"/>
      <style:text-properties fo:font-weight="bold" style:font-weight-asian="bold" style:font-weight-complex="bold"/>
    </style:style>
    <style:style style:name="P34" style:parent-style-name="Normal" style:family="paragraph">
      <style:paragraph-properties fo:text-align="justify"/>
    </style:style>
    <style:style style:name="P35" style:parent-style-name="Normal" style:family="paragraph">
      <style:paragraph-properties fo:text-align="justify"/>
      <style:text-properties fo:font-weight="bold" style:font-weight-asian="bold" style:font-weight-complex="bold"/>
    </style:style>
    <style:style style:name="P36" style:parent-style-name="Normal" style:list-style-name="LFO2" style:family="paragraph">
      <style:paragraph-properties fo:text-align="justify"/>
    </style:style>
    <style:style style:name="P37" style:parent-style-name="Normal" style:list-style-name="LFO2" style:family="paragraph">
      <style:paragraph-properties fo:text-align="justify"/>
    </style:style>
    <style:style style:name="P38" style:parent-style-name="Normal" style:list-style-name="LFO2" style:family="paragraph">
      <style:paragraph-properties fo:text-align="justify"/>
    </style:style>
    <style:style style:name="P39" style:parent-style-name="Normal" style:list-style-name="LFO2" style:family="paragraph">
      <style:paragraph-properties fo:text-align="justify"/>
    </style:style>
    <style:style style:name="P40" style:parent-style-name="Normal" style:family="paragraph">
      <style:paragraph-properties fo:text-align="justify"/>
      <style:text-properties fo:font-weight="bold" style:font-weight-asian="bold" style:font-weight-complex="bold"/>
    </style:style>
    <style:style style:name="P41" style:parent-style-name="Normal" style:family="paragraph">
      <style:paragraph-properties fo:text-align="justify"/>
    </style:style>
    <style:style style:name="P42" style:parent-style-name="Normal" style:family="paragraph">
      <style:paragraph-properties fo:text-align="justify"/>
      <style:text-properties fo:font-weight="bold" style:font-weight-asian="bold" style:font-weight-complex="bold"/>
    </style:style>
    <style:style style:name="P43" style:parent-style-name="Normal" style:family="paragraph">
      <style:paragraph-properties fo:text-align="justify"/>
    </style:style>
    <style:style style:name="P44" style:parent-style-name="Normal" style:family="paragraph">
      <style:paragraph-properties fo:text-align="justify"/>
      <style:text-properties fo:font-weight="bold" style:font-weight-asian="bold" style:font-weight-complex="bold"/>
    </style:style>
    <style:style style:name="P45" style:parent-style-name="Normal" style:family="paragraph">
      <style:paragraph-properties fo:text-align="justify"/>
    </style:style>
    <style:style style:name="P46" style:parent-style-name="Normal" style:family="paragraph">
      <style:paragraph-properties fo:text-align="justify"/>
      <style:text-properties fo:font-weight="bold" style:font-weight-asian="bold" style:font-weight-complex="bold"/>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weight="bold" style:font-weight-asian="bold" style:font-weight-complex="bold"/>
    </style:style>
    <style:style style:name="P49" style:parent-style-name="Normal" style:family="paragraph">
      <style:paragraph-properties fo:text-align="justify"/>
      <style:text-properties fo:font-weight="bold" style:font-weight-asian="bold" style:font-weight-complex="bold"/>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text-properties fo:font-weight="bold" style:font-weight-asian="bold" style:font-weight-complex="bold"/>
    </style:style>
    <style:style style:name="TableColumn61" style:family="table-column">
      <style:table-column-properties style:column-width="0.8701in"/>
    </style:style>
    <style:style style:name="TableColumn62" style:family="table-column">
      <style:table-column-properties style:column-width="0.9611in"/>
    </style:style>
    <style:style style:name="TableColumn63" style:family="table-column">
      <style:table-column-properties style:column-width="1.2666in"/>
    </style:style>
    <style:style style:name="TableColumn64" style:family="table-column">
      <style:table-column-properties style:column-width="1.0562in"/>
    </style:style>
    <style:style style:name="TableColumn65" style:family="table-column">
      <style:table-column-properties style:column-width="1.0819in"/>
    </style:style>
    <style:style style:name="TableColumn66" style:family="table-column">
      <style:table-column-properties style:column-width="1.025in"/>
    </style:style>
    <style:style style:name="Table60" style:family="table">
      <style:table-properties style:width="6.2611in" fo:margin-left="0in" table:align="lef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justify"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justify"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00%"/>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text:span text:style-name="T2">DCIT 208 – SOFTWARE ENGINEERING</text:span></text:p>
      <text:p text:style-name="Normal"><text:span text:style-name="T3">Assignment Number</text:span>: IA2</text:p>
      <text:p text:style-name="Normal"><text:span text:style-name="T4">Assignment Title:<text:s/></text:span>Client Interview Evidence and Requirement Transformation Memo</text:p>
      <text:p text:style-name="Normal"><text:span text:style-name="T5">Full Name:</text:span><text:s/>Patience Owusu</text:p>
      <text:p text:style-name="Normal"><text:span text:style-name="T6">Student ID:</text:span><text:s/>22398703</text:p>
      <text:p text:style-name="Normal"><text:span text:style-name="T7">Team Name:</text:span><text:s/>TEAM NYLA</text:p>
      <text:p text:style-name="Normal"><text:span text:style-name="T8">Project Title:</text:span><text:s/>Nyla Digital Banking Solution</text:p>
      <text:p text:style-name="Normal"><text:span text:style-name="T9">Team Repository URL</text:span>: https://github.com/Dept-of-Comp-Sci-University-of-Ghana/dcit208-client-project-2026-team-engineering-repository-seg26-53-teamnyla.git</text:p>
      <text:p text:style-name="Normal"><text:span text:style-name="T10">Individual Portfolio Repository URL:</text:span><text:s/>https://github.com/opashay/DCIT208-Individual-Portfolio.git</text:p>
      <text:p text:style-name="Normal"><text:span text:style-name="T11"><text:s/>Date:</text:span><text:s/>Friday, 3 July 2026</text:p>
      <text:p text:style-name="P12">AI Disclosure Statement</text:p>
      <text:p text:style-name="Normal">I used AI assistance (ChatGPT) to help organise the structure, improve the wording, and review my work. All project-specific information was verified and adapted by me. I understand that I am responsible for explaining and defending every part of this submiss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A. Personal Client/User Discovery Questions</text:p>
      <text:p text:style-name="Normal">The following questions were prepared to better understand the client's current operations, challenges, and expectations for the Nyla Digital Banking Solution.</text:p>
      <text:list text:style-name="LFO1" text:continue-numbering="true">
        <text:list-item>
          <text:p text:style-name="P14">How do customers currently access banking services, and what steps are involved in the existing process?</text:p>
        </text:list-item>
        <text:list-item>
          <text:p text:style-name="P15">How do bank staff currently manage customer accounts, service requests, and transaction records?</text:p>
        </text:list-item>
        <text:list-item>
          <text:p text:style-name="P16">What are the biggest challenges customers face when using the current banking services?</text:p>
        </text:list-item>
        <text:list-item>
          <text:p text:style-name="P17">Which manual processes consume the most time for bank staff, and why?</text:p>
        </text:list-item>
        <text:list-item>
          <text:p text:style-name="P18">What customer information should the system collect during account registration?</text:p>
        </text:list-item>
        <text:list-item>
          <text:p text:style-name="P19">What transaction or account information should customers be able to view within the system?</text:p>
        </text:list-item>
        <text:list-item>
          <text:p text:style-name="P20">What features would make the digital banking solution successful from the customer's perspective?</text:p>
        </text:list-item>
        <text:list-item>
          <text:p text:style-name="P21">How will the bank determine whether the new system has improved service delivery and customer satisfaction?</text:p>
        </text:list-item>
        <text:list-item>
          <text:p text:style-name="P22">What security measures should be implemented to protect customer accounts and sensitive financial information?</text:p>
        </text:list-item>
        <text:list-item>
          <text:p text:style-name="P23">If the system experiences downtime or a transaction fails, how should the system respond, and how should customers be informed?</text:p>
        </text:list-item>
      </text:list>
      <text:p text:style-name="Normal"/>
      <text:p text:style-name="Normal"/>
      <text:p text:style-name="Normal"/>
      <text:p text:style-name="P24">B. Interview / Observation Evidence</text:p>
      <text:p text:style-name="Normal"/>
      <text:p text:style-name="Normal"><text:s/>Date: 2 July 2026<text:s/></text:p>
      <text:p text:style-name="Normal"><text:s/>Time: 11:55 PM – 12:05 AM<text:s/></text:p>
      <text:p text:style-name="Normal">Medium: WhatsApp Chat</text:p>
      <text:soft-page-break/>
      <text:p text:style-name="Normal"><text:s/>Participant Role: Client Representative<text:s/></text:p>
      <text:p text:style-name="Normal">Evidence Type: Screenshot of WhatsApp conversation<text:s/></text:p>
      <text:soft-page-break/>
      <text:p text:style-name="Normal"><draw:frame draw:style-name="a0" draw:name="Picture 1" text:anchor-type="as-char" svg:x="0in" svg:y="0in" svg:width="4.47847in" svg:height="9.69306in" style:rel-width="scale" style:rel-height="scale"><draw:image xlink:href="media/image1.jpeg" xlink:type="simple" xlink:show="embed" xlink:actuate="onLoad"/><svg:title/><svg:desc/></draw:frame></text:p>
      <text:p text:style-name="Normal"/>
      <text:p text:style-name="P25"><text:s/>Summary of the Conversation</text:p>
      <text:p text:style-name="Normal"/>
      <text:p text:style-name="Normal">A WhatsApp conversation was conducted with the client representative to better understand the current savings process and user behaviour within the Nyla Digital Banking Solution.</text:p>
      <text:p text:style-name="Normal">The client explained that users typically create a savings goal within the application and add money whenever they are able. However, many users do not save consistently and often forget to monitor their savings progress.</text:p>
      <text:p text:style-name="Normal">When asked how frequently users check their savings progress, the client indicated that most users check once or twice each month, unless they are saving for an urgent purpose.</text:p>
      <text:p text:style-name="Normal">The discussion highlighted the importance of providing features that encourage consistent saving and improve user engagement through regular reminders and progress tracking.</text:p>
      <text:p text:style-name="Normal"/>
      <text:p text:style-name="Normal"/>
      <text:p text:style-name="Normal"/>
      <text:p text:style-name="P26">C. Requirement Transformation</text:p>
      <text:p text:style-name="P27">Raw Client Statement</text:p>
      <text:p text:style-name="P28">“Most users create a savings goal in our app and add money whenever they can. They usually check their progress occasionally, but many forget to save consistently."</text:p>
      <text:p text:style-name="P29">Functional Requirement</text:p>
      <text:p text:style-name="P30">The system shall allow registered customers to securely log in, view their account information, submit service requests, and receive notifications from the bank.</text:p>
      <text:p text:style-name="P31">Non-Functional Requirement</text:p>
      <text:p text:style-name="P32">The system shall use secure authentication and encrypted communication to protect customer data and maintain user privacy.</text:p>
      <text:p text:style-name="P33">User Story</text:p>
      <text:p text:style-name="P34">As a bank customer, I want to securely access my account and communicate with the bank online so that I can manage my banking activities conveniently without visiting the bank.</text:p>
      <text:soft-page-break/>
      <text:p text:style-name="P35">Acceptance Criteria</text:p>
      <text:list text:style-name="LFO2" text:continue-numbering="true">
        <text:list-item>
          <text:p text:style-name="P36">Given a registered customer with valid login credentials, when they log in, they shall be granted access to their account dashboard.</text:p>
        </text:list-item>
        <text:list-item>
          <text:p text:style-name="P37">Given a logged-in customer, when they submit a service request, the request shall be recorded successfully and a confirmation message displayed.</text:p>
        </text:list-item>
        <text:list-item>
          <text:p text:style-name="P38">Given a successful transaction or service update, when the event occurs, the customer shall receive a notification.</text:p>
        </text:list-item>
        <text:list-item>
          <text:p text:style-name="P39">Given invalid login credentials, when the customer attempts to log in, then access shall be denied and an appropriate error message displayed.</text:p>
        </text:list-item>
      </text:list>
      <text:p text:style-name="P40">API / Interface Implication</text:p>
      <text:p text:style-name="P41">The system should integrate with an email or SMS notification service to send alerts and confirmations to customers.</text:p>
      <text:p text:style-name="P42">Data Implication</text:p>
      <text:p text:style-name="P43">The system will store customer details, account information, service requests, transaction records, and notification history.</text:p>
      <text:p text:style-name="P44">Test Idea</text:p>
      <text:p text:style-name="P45">Verify that a registered customer can successfully log in, submit a service request, and receive a notification while unauthorised users are denied access.</text:p>
      <text:p text:style-name="P46">Open Question</text:p>
      <text:p text:style-name="P47">Should customers receive notifications through email, SMS, or both?</text:p>
      <text:p text:style-name="P48"/>
      <text:p text:style-name="P49">D. Reflection</text:p>
      <text:p text:style-name="P50"/>
      <text:p text:style-name="P51">Speaking with the client representative improved my understanding of how users currently manage their savings goals. Before the conversation, I assumed that customers regularly monitored their savings progress because they had already created savings goals within the application. However, the discussion showed that many users only check their progress occasionally and sometimes forget to save consistently.</text:p>
      <text:p text:style-name="P52">This changed my understanding of the client's problem. I<text:s/>realised<text:s/>that developing a digital banking solution is not only about<text:s/>enabling users to set savings goals but also about encouraging ongoing<text:s/>engagement with those goals. Features such as reminders, notifications, and progress updates can help users develop consistent saving habits.</text:p>
      <text:soft-page-break/>
      <text:p text:style-name="P53">Another lesson I learned is the importance of asking clear and focused questions during requirements gathering. Although the client's responses were brief, they provided useful insights into user behaviour and helped identify additional system requirements<text:s/>not apparent<text:s/>from the initial problem statement.</text:p>
      <text:p text:style-name="P54">The conversation also showed that requirements gathering is an ongoing process. Initial assumptions may change after interacting with stakeholders, making it necessary to validate requirements before system design and implementation.</text:p>
      <text:p text:style-name="P55">Overall, this activity helped me appreciate the importance of client communication in software engineering. Even a short conversation can reveal valuable information that improves system requirements and helps developers design solutions that better meet user needs.</text:p>
      <text:p text:style-name="P56"/>
      <text:p text:style-name="P57"/>
      <text:p text:style-name="P58"/>
      <text:p text:style-name="P59">AI Disclosure</text:p>
      <table:table table:style-name="Table60">
        <table:table-columns>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Date</text:p>
          </table:table-cell>
          <table:table-cell table:style-name="TableCell70">
            <text:p text:style-name="P71">AI Tool</text:p>
          </table:table-cell>
          <table:table-cell table:style-name="TableCell72">
            <text:p text:style-name="P73">Prompt Summary</text:p>
          </table:table-cell>
          <table:table-cell table:style-name="TableCell74">
            <text:p text:style-name="P75">Output Used</text:p>
          </table:table-cell>
          <table:table-cell table:style-name="TableCell76">
            <text:p text:style-name="P77">Output Rejected</text:p>
          </table:table-cell>
          <table:table-cell table:style-name="TableCell78">
            <text:p text:style-name="P79">Verification</text:p>
          </table:table-cell>
        </table:table-row>
        <table:table-row table:style-name="TableRow80">
          <table:table-cell table:style-name="TableCell81">
            <text:p text:style-name="P82">3 July 2026</text:p>
          </table:table-cell>
          <table:table-cell table:style-name="TableCell83">
            <text:p text:style-name="P84">ChatGPT</text:p>
          </table:table-cell>
          <table:table-cell table:style-name="TableCell85">
            <text:p text:style-name="P86">Helped<text:s/>organise<text:s/>the IA2 report, improve grammar, and structure the interview questions, requirement transformation, and reflection.</text:p>
          </table:table-cell>
          <table:table-cell table:style-name="TableCell87">
            <text:p text:style-name="P88">Used the report structure, improved wording, and formatting suggestions.</text:p>
          </table:table-cell>
          <table:table-cell table:style-name="TableCell89">
            <text:p text:style-name="P90">Rejected any content that was not supported by the client's WhatsApp conversation or the project documents.</text:p>
          </table:table-cell>
          <table:table-cell table:style-name="TableCell91">
            <text:p text:style-name="P92">Verified all information against the client's WhatsApp messages and the official project brief before including it in the final report.</text:p>
          </table:table-cell>
        </table:table-row>
      </table:table>
      <text:p text:style-name="P93"/>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ptos" style:font-name-asian="Times New Roman" style:font-name-complex="Times New Roman" style:letter-kerning="false" fo:font-size="11pt" style:font-size-asian="11pt" style:font-size-complex="11pt" fo:language="en" fo:country="US"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CIT 208 – SOFTWARE ENGINEERING</dc:title>
    <dc:description/>
    <dc:subject>TEAM NYLA</dc:subject>
    <meta:initial-creator>OWUSU PATIENCE</meta:initial-creator>
    <dc:creator>OWUSU PATIENCE</dc:creator>
    <meta:creation-date>2026-07-03T09:05:00Z</meta:creation-date>
    <dc:date>2026-07-03T09:05:00Z</dc:date>
    <meta:print-date>2026-07-03T09:01:00Z</meta:print-date>
    <meta:template xlink:href="Normal" xlink:type="simple"/>
    <meta:editing-cycles>2</meta:editing-cycles>
    <meta:editing-duration>PT240S</meta:editing-duration>
    <meta:user-defined meta:name="GrammarlyDocumentId">f1af26ee-08db-4935-9000-8df5133d44f9</meta:user-defined>
    <meta:document-statistic meta:page-count="7" meta:paragraph-count="13" meta:word-count="1039" meta:character-count="6954" meta:row-count="49" meta:non-whitespace-character-count="5928"/>
  </office:meta>
</office:document-meta>
</file>